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46cm"/>
    </style:style>
    <style:style style:name="co2" style:family="table-column">
      <style:table-column-properties fo:break-before="auto" style:column-width="9.469cm"/>
    </style:style>
    <style:style style:name="co3" style:family="table-column">
      <style:table-column-properties fo:break-before="auto" style:column-width="2.258cm"/>
    </style:style>
    <style:style style:name="co4" style:family="table-column">
      <style:table-column-properties fo:break-before="auto" style:column-width="3.29cm"/>
    </style:style>
    <style:style style:name="co5" style:family="table-column">
      <style:table-column-properties fo:break-before="auto" style:column-width="3.099cm"/>
    </style:style>
    <style:style style:name="co6" style:family="table-column">
      <style:table-column-properties fo:break-before="auto" style:column-width="2.526cm"/>
    </style:style>
    <style:style style:name="co7" style:family="table-column">
      <style:table-column-properties fo:break-before="auto" style:column-width="2.462cm"/>
    </style:style>
    <style:style style:name="co8" style:family="table-column">
      <style:table-column-properties fo:break-before="auto" style:column-width="2.716cm"/>
    </style:style>
    <style:style style:name="co9" style:family="table-column">
      <style:table-column-properties fo:break-before="auto" style:column-width="3.651cm"/>
    </style:style>
    <style:style style:name="co10" style:family="table-column">
      <style:table-column-properties fo:break-before="auto" style:column-width="2.695cm"/>
    </style:style>
    <style:style style:name="co11" style:family="table-column">
      <style:table-column-properties fo:break-before="auto" style:column-width="2.484cm"/>
    </style:style>
    <style:style style:name="co12" style:family="table-column">
      <style:table-column-properties fo:break-before="auto" style:column-width="2.547cm"/>
    </style:style>
    <style:style style:name="co13" style:family="table-column">
      <style:table-column-properties fo:break-before="auto" style:column-width="3.226cm"/>
    </style:style>
    <style:style style:name="co14" style:family="table-column">
      <style:table-column-properties fo:break-before="auto" style:column-width="2.801cm"/>
    </style:style>
    <style:style style:name="co15" style:family="table-column">
      <style:table-column-properties fo:break-before="auto" style:column-width="4.309cm"/>
    </style:style>
    <style:style style:name="co16" style:family="table-column">
      <style:table-column-properties fo:break-before="auto" style:column-width="3.501cm"/>
    </style:style>
    <style:style style:name="co17" style:family="table-column">
      <style:table-column-properties fo:break-before="auto" style:column-width="3.12cm"/>
    </style:style>
    <style:style style:name="ro1" style:family="table-row">
      <style:table-row-properties style:row-height="0.77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57cm" fo:break-before="auto" style:use-optimal-row-height="true"/>
    </style:style>
    <style:style style:name="ro6" style:family="table-row">
      <style:table-row-properties style:row-height="1.252cm" fo:break-before="auto" style:use-optimal-row-height="true"/>
    </style:style>
    <style:style style:name="ro7" style:family="table-row">
      <style:table-row-properties style:row-height="6.927cm" fo:break-before="auto" style:use-optimal-row-height="fals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 %</number:text>
    </number:percentage-style>
    <style:style style:name="ce1" style:family="table-cell" style:parent-style-name="Default">
      <style:text-properties fo:font-size="18pt" fo:font-weight="bold" style:font-size-asian="18pt" style:font-weight-asian="bold" style:font-size-complex="18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able-cell-properties fo:background-color="#b4c7dc" style:text-align-source="fix" style:repeat-content="false" fo:wrap-option="wrap" fo:border="0.74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4c7dc" style:text-align-source="fix" style:repeat-content="false" fo:wrap-option="wrap" fo:border="0.74pt solid #000000"/>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solid #000000"/>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3">
      <style:table-cell-properties style:text-align-source="fix" style:repeat-content="false" fo:wrap-option="wrap" fo:border="0.74pt solid #000000"/>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b4c7dc" style:text-align-source="fix" style:repeat-content="false" fo:wrap-option="wrap" fo:border="0.74pt solid #000000"/>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74pt solid #000000"/>
      <style:paragraph-properties fo:text-align="center" fo:margin-left="0cm"/>
    </style:style>
    <style:style style:name="ce10" style:family="table-cell" style:parent-style-name="Default" style:data-style-name="N3">
      <style:table-cell-properties style:text-align-source="fix" style:repeat-content="false" fo:border="0.74pt solid #000000"/>
      <style:paragraph-properties fo:text-align="center" fo:margin-left="0cm"/>
    </style:style>
    <style:style style:name="ce11" style:family="table-cell" style:parent-style-name="Default" style:data-style-name="N3">
      <style:table-cell-properties style:text-align-source="fix" style:repeat-content="false" fo:border="0.74pt solid #000000"/>
      <style:paragraph-properties fo:text-align="center" fo:margin-left="0cm"/>
      <style:text-properties style:font-name="Liberation Serif" style:font-name-asian="Segoe UI" style:font-name-complex="Tahoma"/>
    </style:style>
    <style:style style:name="ce12" style:family="table-cell" style:parent-style-name="Default">
      <style:text-properties fo:font-size="18pt" style:font-size-asian="18pt" style:font-size-complex="18pt"/>
    </style:style>
    <style:style style:name="ce13" style:family="table-cell" style:parent-style-name="Default">
      <style:text-properties fo:font-size="13pt" fo:font-weight="bold" style:font-size-asian="13pt" style:font-weight-asian="bold" style:font-size-complex="13pt" style:font-weight-complex="bold"/>
    </style:style>
    <style:style style:name="ce14"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ackground-color="#b4c7dc" style:text-align-source="fix" style:repeat-content="false" fo:wrap-option="wrap" fo:border="0.74pt solid #000000"/>
      <style:paragraph-properties fo:text-align="end"/>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74pt solid #000000"/>
      <style:paragraph-properties fo:text-align="end"/>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
      <style:table-cell-properties style:text-align-source="fix" style:repeat-content="false" fo:wrap-option="wrap" fo:border="0.74pt solid #000000"/>
      <style:paragraph-properties fo:text-align="end"/>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null-year="1950"/>
      <table:table table:name="00_Accueil" table:style-name="ta1">
        <table:table-column table:style-name="co1" table:default-cell-style-name="ce4"/>
        <table:table-column table:style-name="co2" table:default-cell-style-name="Default"/>
        <table:table-row table:style-name="ro1">
          <table:table-cell table:style-name="ce1" office:value-type="string" calcext:value-type="string">
            <text:p>Mini-modèle d’évaluation économique d’un projet minier fictif</text:p>
          </table:table-cell>
          <table:table-cell/>
        </table:table-row>
        <table:table-row table:style-name="ro2">
          <table:table-cell table:style-name="ce2" office:value-type="string" calcext:value-type="string">
            <text:p>Analyse simplifiée par actualisation des flux de trésorerie</text:p>
          </table:table-cell>
          <table:table-cell/>
        </table:table-row>
        <table:table-row table:style-name="ro3">
          <table:table-cell table:style-name="Default"/>
          <table:table-cell/>
        </table:table-row>
        <table:table-row table:style-name="ro3">
          <table:table-cell table:style-name="ce3" office:value-type="string" calcext:value-type="string">
            <text:p>Élément</text:p>
          </table:table-cell>
          <table:table-cell table:style-name="ce3" office:value-type="string" calcext:value-type="string">
            <text:p>Description</text:p>
          </table:table-cell>
        </table:table-row>
        <table:table-row table:style-name="ro3">
          <table:table-cell office:value-type="string" calcext:value-type="string">
            <text:p>Type de projet</text:p>
          </table:table-cell>
          <table:table-cell table:style-name="ce4" office:value-type="string" calcext:value-type="string">
            <text:p>Modèle simplifié d’évaluation économique d’un projet minier</text:p>
          </table:table-cell>
        </table:table-row>
        <table:table-row table:style-name="ro4">
          <table:table-cell office:value-type="string" calcext:value-type="string">
            <text:p>Objectif</text:p>
          </table:table-cell>
          <table:table-cell table:style-name="ce4" office:value-type="string" calcext:value-type="string">
            <text:p>Estimer l’attractivité économique d’un projet fictif à partir des cash-flows actualisés</text:p>
          </table:table-cell>
        </table:table-row>
        <table:table-row table:style-name="ro3">
          <table:table-cell office:value-type="string" calcext:value-type="string">
            <text:p>Indicateurs principaux</text:p>
          </table:table-cell>
          <table:table-cell table:style-name="ce4" office:value-type="string" calcext:value-type="string">
            <text:p>VAN, TRI, délai de récupération, cash-flow annuel moyen</text:p>
          </table:table-cell>
        </table:table-row>
        <table:table-row table:style-name="ro3">
          <table:table-cell office:value-type="string" calcext:value-type="string">
            <text:p>Scénarios</text:p>
          </table:table-cell>
          <table:table-cell table:style-name="ce4" office:value-type="string" calcext:value-type="string">
            <text:p>Pessimiste, central, optimiste</text:p>
          </table:table-cell>
        </table:table-row>
        <table:table-row table:style-name="ro3">
          <table:table-cell office:value-type="string" calcext:value-type="string">
            <text:p>Outil utilisé</text:p>
          </table:table-cell>
          <table:table-cell table:style-name="ce4" office:value-type="string" calcext:value-type="string">
            <text:p>Microsoft Excel</text:p>
          </table:table-cell>
        </table:table-row>
        <table:table-row table:style-name="ro3">
          <table:table-cell office:value-type="string" calcext:value-type="string">
            <text:p>Type de données</text:p>
          </table:table-cell>
          <table:table-cell table:style-name="ce4" office:value-type="string" calcext:value-type="string">
            <text:p>Hypothèses fictives et pédagogiques</text:p>
          </table:table-cell>
        </table:table-row>
        <table:table-row table:style-name="ro3" table:number-rows-repeated="2">
          <table:table-cell table:style-name="Default"/>
          <table:table-cell/>
        </table:table-row>
        <table:table-row table:style-name="ro3">
          <table:table-cell table:style-name="Default" office:value-type="string" calcext:value-type="string">
            <text:p>Ce fichier Excel présente un modèle simplifié d’évaluation économique d’un projet minier fictif. Il calcule les revenus, les coûts d’exploitation, le CAPEX, les taxes, le coût de fermeture, les cash-flows nets et les cash-flows actualisés. Il permet ensuite de calculer la VAN, le TRI, le délai de récupération et le cash-flow annuel moyen.</text:p>
          </table:table-cell>
          <table:table-cell/>
        </table:table-row>
        <table:table-row table:style-name="ro3">
          <table:table-cell table:style-name="Default" office:value-type="string" calcext:value-type="string">
            <text:p>Ce modèle est fictif et pédagogique. Il ne repose pas sur des données géologiques, techniques ou financières réelles et ne remplace pas une étude de faisabilité minière.</text:p>
          </table:table-cell>
          <table:table-cell/>
        </table:table-row>
      </table:table>
      <table:table table:name="01_Hypothèses" table:style-name="ta1">
        <table:table-column table:style-name="co4" table:default-cell-style-name="ce6"/>
        <table:table-column table:style-name="co5" table:default-cell-style-name="ce7"/>
        <table:table-column table:style-name="co6" table:default-cell-style-name="ce7"/>
        <table:table-column table:style-name="co7" table:default-cell-style-name="ce7"/>
        <table:table-column table:style-name="co8" table:default-cell-style-name="ce6"/>
        <table:table-row table:style-name="ro1">
          <table:table-cell table:style-name="ce1" office:value-type="string" calcext:value-type="string">
            <text:p>Hypothèses du projet</text:p>
          </table:table-cell>
          <table:table-cell table:style-name="Default" table:number-columns-repeated="4"/>
        </table:table-row>
        <table:table-row table:style-name="ro3" table:number-rows-repeated="2">
          <table:table-cell table:style-name="Default" table:number-columns-repeated="5"/>
        </table:table-row>
        <table:table-row table:style-name="ro3">
          <table:table-cell table:style-name="ce5" office:value-type="string" calcext:value-type="string">
            <text:p>Hypothèse</text:p>
          </table:table-cell>
          <table:table-cell table:style-name="ce5" office:value-type="string" calcext:value-type="string">
            <text:p>Central</text:p>
          </table:table-cell>
          <table:table-cell table:style-name="ce5" office:value-type="string" calcext:value-type="string">
            <text:p>Pessimiste</text:p>
          </table:table-cell>
          <table:table-cell table:style-name="ce5" office:value-type="string" calcext:value-type="string">
            <text:p>Optimiste</text:p>
          </table:table-cell>
          <table:table-cell table:style-name="ce5" office:value-type="string" calcext:value-type="string">
            <text:p>Unité</text:p>
          </table:table-cell>
        </table:table-row>
        <table:table-row table:style-name="ro4">
          <table:table-cell office:value-type="string" calcext:value-type="string">
            <text:p>Durée de vie de la mine</text:p>
          </table:table-cell>
          <table:table-cell table:number-columns-repeated="3" office:value-type="float" office:value="12" calcext:value-type="float">
            <text:p>12</text:p>
          </table:table-cell>
          <table:table-cell office:value-type="string" calcext:value-type="string">
            <text:p>ans</text:p>
          </table:table-cell>
        </table:table-row>
        <table:table-row table:style-name="ro4">
          <table:table-cell office:value-type="string" calcext:value-type="string">
            <text:p>Années de construction</text:p>
          </table:table-cell>
          <table:table-cell table:number-columns-repeated="3" office:value-type="float" office:value="2" calcext:value-type="float">
            <text:p>2</text:p>
          </table:table-cell>
          <table:table-cell office:value-type="string" calcext:value-type="string">
            <text:p>ans</text:p>
          </table:table-cell>
        </table:table-row>
        <table:table-row table:style-name="ro4">
          <table:table-cell office:value-type="string" calcext:value-type="string">
            <text:p>Production annuelle</text:p>
          </table:table-cell>
          <table:table-cell table:number-columns-repeated="3" office:value-type="float" office:value="100000" calcext:value-type="float">
            <text:p>100 000</text:p>
          </table:table-cell>
          <table:table-cell office:value-type="string" calcext:value-type="string">
            <text:p>tonnes</text:p>
          </table:table-cell>
        </table:table-row>
        <table:table-row table:style-name="ro3">
          <table:table-cell office:value-type="string" calcext:value-type="string">
            <text:p>Prix de vente</text:p>
          </table:table-cell>
          <table:table-cell office:value-type="float" office:value="1500" calcext:value-type="float">
            <text:p>1 500</text:p>
          </table:table-cell>
          <table:table-cell office:value-type="float" office:value="1125" calcext:value-type="float">
            <text:p>1 125</text:p>
          </table:table-cell>
          <table:table-cell office:value-type="float" office:value="1875" calcext:value-type="float">
            <text:p>1 875</text:p>
          </table:table-cell>
          <table:table-cell office:value-type="string" calcext:value-type="string">
            <text:p>$/tonne</text:p>
          </table:table-cell>
        </table:table-row>
        <table:table-row table:style-name="ro4">
          <table:table-cell office:value-type="string" calcext:value-type="string">
            <text:p>OPEX par tonne</text:p>
          </table:table-cell>
          <table:table-cell office:value-type="float" office:value="700" calcext:value-type="float">
            <text:p>700</text:p>
          </table:table-cell>
          <table:table-cell office:value-type="float" office:value="805" calcext:value-type="float">
            <text:p>805</text:p>
          </table:table-cell>
          <table:table-cell office:value-type="float" office:value="665" calcext:value-type="float">
            <text:p>665</text:p>
          </table:table-cell>
          <table:table-cell office:value-type="string" calcext:value-type="string">
            <text:p>$/tonne</text:p>
          </table:table-cell>
        </table:table-row>
        <table:table-row table:style-name="ro3">
          <table:table-cell office:value-type="string" calcext:value-type="string">
            <text:p>CAPEX initial</text:p>
          </table:table-cell>
          <table:table-cell office:value-type="float" office:value="300000000" calcext:value-type="float">
            <text:p>300 000 000</text:p>
          </table:table-cell>
          <table:table-cell office:value-type="float" office:value="360000000" calcext:value-type="float">
            <text:p>360 000 000</text:p>
          </table:table-cell>
          <table:table-cell office:value-type="float" office:value="270000000" calcext:value-type="float">
            <text:p>270 000 000</text:p>
          </table:table-cell>
          <table:table-cell office:value-type="string" calcext:value-type="string">
            <text:p>$</text:p>
          </table:table-cell>
        </table:table-row>
        <table:table-row table:style-name="ro4">
          <table:table-cell office:value-type="string" calcext:value-type="string">
            <text:p>Taux d’actualisation</text:p>
          </table:table-cell>
          <table:table-cell table:number-columns-repeated="3" office:value-type="float" office:value="0.08" calcext:value-type="float">
            <text:p>0</text:p>
          </table:table-cell>
          <table:table-cell office:value-type="string" calcext:value-type="string">
            <text:p>%</text:p>
          </table:table-cell>
        </table:table-row>
        <table:table-row table:style-name="ro4">
          <table:table-cell office:value-type="string" calcext:value-type="string">
            <text:p>Taxes / royalties</text:p>
          </table:table-cell>
          <table:table-cell table:number-columns-repeated="3" office:value-type="float" office:value="0.1" calcext:value-type="float">
            <text:p>0</text:p>
          </table:table-cell>
          <table:table-cell office:value-type="string" calcext:value-type="string">
            <text:p>%</text:p>
          </table:table-cell>
        </table:table-row>
        <table:table-row table:style-name="ro4">
          <table:table-cell office:value-type="string" calcext:value-type="string">
            <text:p>Coût de fermeture</text:p>
          </table:table-cell>
          <table:table-cell table:number-columns-repeated="3" office:value-type="float" office:value="30000000" calcext:value-type="float">
            <text:p>30 000 000</text:p>
          </table:table-cell>
          <table:table-cell office:value-type="string" calcext:value-type="string">
            <text:p>$</text:p>
          </table:table-cell>
        </table:table-row>
      </table:table>
      <table:table table:name="02_CF_Central" table:style-name="ta1">
        <table:table-column table:style-name="co3" table:default-cell-style-name="ce9"/>
        <table:table-column table:style-name="co9" table:default-cell-style-name="ce6"/>
        <table:table-column table:style-name="co3" table:number-columns-repeated="2"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3" table:default-cell-style-name="ce10"/>
        <table:table-column table:style-name="co14" table:default-cell-style-name="ce10"/>
        <table:table-column table:style-name="co15" table:default-cell-style-name="ce10"/>
        <table:table-column table:style-name="co16" table:default-cell-style-name="ce10"/>
        <table:table-row table:style-name="ro1">
          <table:table-cell table:style-name="ce1" office:value-type="string" calcext:value-type="string">
            <text:p>Cash-flows du scénario central</text:p>
          </table:table-cell>
          <table:table-cell table:style-name="Default" table:number-columns-repeated="11"/>
        </table:table-row>
        <table:table-row table:style-name="ro2">
          <table:table-cell table:style-name="ce2" office:value-type="string" calcext:value-type="string">
            <text:p>Calcul annuel des flux de trésorerie du scénario central</text:p>
          </table:table-cell>
          <table:table-cell table:style-name="Default" table:number-columns-repeated="11"/>
        </table:table-row>
        <table:table-row table:style-name="ro3">
          <table:table-cell table:style-name="Default" table:number-columns-repeated="12"/>
        </table:table-row>
        <table:table-row table:style-name="ro3">
          <table:table-cell table:style-name="ce8" office:value-type="string" calcext:value-type="string">
            <text:p>Année </text:p>
          </table:table-cell>
          <table:table-cell table:style-name="ce8" office:value-type="string" calcext:value-type="string">
            <text:p>Phase </text:p>
          </table:table-cell>
          <table:table-cell table:style-name="ce8" office:value-type="string" calcext:value-type="string">
            <text:p>Production </text:p>
          </table:table-cell>
          <table:table-cell table:style-name="ce8" office:value-type="string" calcext:value-type="string">
            <text:p>Prix </text:p>
          </table:table-cell>
          <table:table-cell table:style-name="ce8" office:value-type="string" calcext:value-type="string">
            <text:p>Revenus </text:p>
          </table:table-cell>
          <table:table-cell table:style-name="ce8" office:value-type="string" calcext:value-type="string">
            <text:p>OPEX </text:p>
          </table:table-cell>
          <table:table-cell table:style-name="ce8" office:value-type="string" calcext:value-type="string">
            <text:p>CAPEX </text:p>
          </table:table-cell>
          <table:table-cell table:style-name="ce8" office:value-type="string" calcext:value-type="string">
            <text:p>Taxes/Royalties </text:p>
          </table:table-cell>
          <table:table-cell table:style-name="ce8" office:value-type="string" calcext:value-type="string">
            <text:p>Fermeture </text:p>
          </table:table-cell>
          <table:table-cell table:style-name="ce8" office:value-type="string" calcext:value-type="string">
            <text:p>Cash-flow net </text:p>
          </table:table-cell>
          <table:table-cell table:style-name="ce8" office:value-type="string" calcext:value-type="string">
            <text:p>Cash-flow actualisé </text:p>
          </table:table-cell>
          <table:table-cell table:style-name="ce8" office:value-type="string" calcext:value-type="string">
            <text:p>Cash-flow cumulé </text:p>
          </table:table-cell>
        </table:table-row>
        <table:table-row table:style-name="ro3">
          <table:table-cell office:value-type="float" office:value="0" calcext:value-type="float">
            <text:p>0</text:p>
          </table:table-cell>
          <table:table-cell office:value-type="string" calcext:value-type="string">
            <text:p>Construction </text:p>
          </table:table-cell>
          <table:table-cell table:number-columns-repeated="4" table:style-name="ce7" office:value-type="float" office:value="0" calcext:value-type="float">
            <text:p>0</text:p>
          </table:table-cell>
          <table:table-cell table:style-name="ce11" office:value-type="float" office:value="-150000000" calcext:value-type="float">
            <text:p>-150 000 000</text:p>
          </table:table-cell>
          <table:table-cell table:number-columns-repeated="2" office:value-type="float" office:value="0" calcext:value-type="float">
            <text:p>0</text:p>
          </table:table-cell>
          <table:table-cell table:formula="of:=[.E5]+[.F5]+[.G5]+[.H5]+[.I5]" office:value-type="float" office:value="-150000000" calcext:value-type="float">
            <text:p>-150 000 000</text:p>
          </table:table-cell>
          <table:table-cell table:formula="of:=[.J5]/(1+8%)^[.A5]" office:value-type="float" office:value="-150000000" calcext:value-type="float">
            <text:p>-150 000 000</text:p>
          </table:table-cell>
          <table:table-cell table:formula="of:=[.J5]" office:value-type="float" office:value="-150000000" calcext:value-type="float">
            <text:p>-150 000 000</text:p>
          </table:table-cell>
        </table:table-row>
        <table:table-row table:style-name="ro3">
          <table:table-cell office:value-type="float" office:value="1" calcext:value-type="float">
            <text:p>1</text:p>
          </table:table-cell>
          <table:table-cell office:value-type="string" calcext:value-type="string">
            <text:p>Construction </text:p>
          </table:table-cell>
          <table:table-cell table:number-columns-repeated="4" table:style-name="ce7" office:value-type="float" office:value="0" calcext:value-type="float">
            <text:p>0</text:p>
          </table:table-cell>
          <table:table-cell table:style-name="ce11" office:value-type="float" office:value="-150000000" calcext:value-type="float">
            <text:p>-150 000 000</text:p>
          </table:table-cell>
          <table:table-cell table:number-columns-repeated="2" office:value-type="float" office:value="0" calcext:value-type="float">
            <text:p>0</text:p>
          </table:table-cell>
          <table:table-cell table:formula="of:=[.E6]+[.F6]+[.G6]+[.H6]+[.I6]" office:value-type="float" office:value="-150000000" calcext:value-type="float">
            <text:p>-150 000 000</text:p>
          </table:table-cell>
          <table:table-cell table:formula="of:=[.J6]/(1+8%)^[.A6]" office:value-type="float" office:value="-138888888.888889" calcext:value-type="float">
            <text:p>-138 888 889</text:p>
          </table:table-cell>
          <table:table-cell table:formula="of:=[.L5]+[.J6]" office:value-type="float" office:value="-300000000" calcext:value-type="float">
            <text:p>-300 000 000</text:p>
          </table:table-cell>
        </table:table-row>
        <table:table-row table:style-name="ro3">
          <table:table-cell office:value-type="float" office:value="2" calcext:value-type="float">
            <text:p>2</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7]+[.F7]+[.G7]+[.H7]+[.I7]" office:value-type="float" office:value="72000000" calcext:value-type="float">
            <text:p>72 000 000</text:p>
          </table:table-cell>
          <table:table-cell table:formula="of:=[.J7]/(1+8%)^[.A7]" office:value-type="float" office:value="61728395.0617284" calcext:value-type="float">
            <text:p>61 728 395</text:p>
          </table:table-cell>
          <table:table-cell table:formula="of:=[.L6]+[.J7]" office:value-type="float" office:value="-228000000" calcext:value-type="float">
            <text:p>-228 000 000</text:p>
          </table:table-cell>
        </table:table-row>
        <table:table-row table:style-name="ro3">
          <table:table-cell office:value-type="float" office:value="3" calcext:value-type="float">
            <text:p>3</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8]+[.F8]+[.G8]+[.H8]+[.I8]" office:value-type="float" office:value="72000000" calcext:value-type="float">
            <text:p>72 000 000</text:p>
          </table:table-cell>
          <table:table-cell table:formula="of:=[.J8]/(1+8%)^[.A8]" office:value-type="float" office:value="57155921.3534522" calcext:value-type="float">
            <text:p>57 155 921</text:p>
          </table:table-cell>
          <table:table-cell table:formula="of:=[.L7]+[.J8]" office:value-type="float" office:value="-156000000" calcext:value-type="float">
            <text:p>-156 000 000</text:p>
          </table:table-cell>
        </table:table-row>
        <table:table-row table:style-name="ro3">
          <table:table-cell office:value-type="float" office:value="4" calcext:value-type="float">
            <text:p>4</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9]+[.F9]+[.G9]+[.H9]+[.I9]" office:value-type="float" office:value="72000000" calcext:value-type="float">
            <text:p>72 000 000</text:p>
          </table:table-cell>
          <table:table-cell table:formula="of:=[.J9]/(1+8%)^[.A9]" office:value-type="float" office:value="52922149.4013446" calcext:value-type="float">
            <text:p>52 922 149</text:p>
          </table:table-cell>
          <table:table-cell table:formula="of:=[.L8]+[.J9]" office:value-type="float" office:value="-84000000" calcext:value-type="float">
            <text:p>-84 000 000</text:p>
          </table:table-cell>
        </table:table-row>
        <table:table-row table:style-name="ro3">
          <table:table-cell office:value-type="float" office:value="5" calcext:value-type="float">
            <text:p>5</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10]+[.F10]+[.G10]+[.H10]+[.I10]" office:value-type="float" office:value="72000000" calcext:value-type="float">
            <text:p>72 000 000</text:p>
          </table:table-cell>
          <table:table-cell table:formula="of:=[.J10]/(1+8%)^[.A10]" office:value-type="float" office:value="49001990.1864302" calcext:value-type="float">
            <text:p>49 001 990</text:p>
          </table:table-cell>
          <table:table-cell table:formula="of:=[.L9]+[.J10]" office:value-type="float" office:value="-12000000" calcext:value-type="float">
            <text:p>-12 000 000</text:p>
          </table:table-cell>
        </table:table-row>
        <table:table-row table:style-name="ro3">
          <table:table-cell office:value-type="float" office:value="6" calcext:value-type="float">
            <text:p>6</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11]+[.F11]+[.G11]+[.H11]+[.I11]" office:value-type="float" office:value="72000000" calcext:value-type="float">
            <text:p>72 000 000</text:p>
          </table:table-cell>
          <table:table-cell table:formula="of:=[.J11]/(1+8%)^[.A11]" office:value-type="float" office:value="45372213.1355835" calcext:value-type="float">
            <text:p>45 372 213</text:p>
          </table:table-cell>
          <table:table-cell table:formula="of:=[.L10]+[.J11]" office:value-type="float" office:value="60000000" calcext:value-type="float">
            <text:p>60 000 000</text:p>
          </table:table-cell>
        </table:table-row>
        <table:table-row table:style-name="ro3">
          <table:table-cell office:value-type="float" office:value="7" calcext:value-type="float">
            <text:p>7</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12]+[.F12]+[.G12]+[.H12]+[.I12]" office:value-type="float" office:value="72000000" calcext:value-type="float">
            <text:p>72 000 000</text:p>
          </table:table-cell>
          <table:table-cell table:formula="of:=[.J12]/(1+8%)^[.A12]" office:value-type="float" office:value="42011308.4588736" calcext:value-type="float">
            <text:p>42 011 308</text:p>
          </table:table-cell>
          <table:table-cell table:formula="of:=[.L11]+[.J12]" office:value-type="float" office:value="132000000" calcext:value-type="float">
            <text:p>132 000 000</text:p>
          </table:table-cell>
        </table:table-row>
        <table:table-row table:style-name="ro3">
          <table:table-cell office:value-type="float" office:value="8" calcext:value-type="float">
            <text:p>8</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13]+[.F13]+[.G13]+[.H13]+[.I13]" office:value-type="float" office:value="72000000" calcext:value-type="float">
            <text:p>72 000 000</text:p>
          </table:table-cell>
          <table:table-cell table:formula="of:=[.J13]/(1+8%)^[.A13]" office:value-type="float" office:value="38899359.6841423" calcext:value-type="float">
            <text:p>38 899 360</text:p>
          </table:table-cell>
          <table:table-cell table:formula="of:=[.L12]+[.J13]" office:value-type="float" office:value="204000000" calcext:value-type="float">
            <text:p>204 000 000</text:p>
          </table:table-cell>
        </table:table-row>
        <table:table-row table:style-name="ro3">
          <table:table-cell office:value-type="float" office:value="9" calcext:value-type="float">
            <text:p>9</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14]+[.F14]+[.G14]+[.H14]+[.I14]" office:value-type="float" office:value="72000000" calcext:value-type="float">
            <text:p>72 000 000</text:p>
          </table:table-cell>
          <table:table-cell table:formula="of:=[.J14]/(1+8%)^[.A14]" office:value-type="float" office:value="36017925.633465" calcext:value-type="float">
            <text:p>36 017 926</text:p>
          </table:table-cell>
          <table:table-cell table:formula="of:=[.L13]+[.J14]" office:value-type="float" office:value="276000000" calcext:value-type="float">
            <text:p>276 000 000</text:p>
          </table:table-cell>
        </table:table-row>
        <table:table-row table:style-name="ro3">
          <table:table-cell office:value-type="float" office:value="10" calcext:value-type="float">
            <text:p>10</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15]+[.F15]+[.G15]+[.H15]+[.I15]" office:value-type="float" office:value="72000000" calcext:value-type="float">
            <text:p>72 000 000</text:p>
          </table:table-cell>
          <table:table-cell table:formula="of:=[.J15]/(1+8%)^[.A15]" office:value-type="float" office:value="33349931.1420973" calcext:value-type="float">
            <text:p>33 349 931</text:p>
          </table:table-cell>
          <table:table-cell table:formula="of:=[.L14]+[.J15]" office:value-type="float" office:value="348000000" calcext:value-type="float">
            <text:p>348 000 000</text:p>
          </table:table-cell>
        </table:table-row>
        <table:table-row table:style-name="ro3">
          <table:table-cell office:value-type="float" office:value="11" calcext:value-type="float">
            <text:p>11</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16]+[.F16]+[.G16]+[.H16]+[.I16]" office:value-type="float" office:value="72000000" calcext:value-type="float">
            <text:p>72 000 000</text:p>
          </table:table-cell>
          <table:table-cell table:formula="of:=[.J16]/(1+8%)^[.A16]" office:value-type="float" office:value="30879565.8723123" calcext:value-type="float">
            <text:p>30 879 566</text:p>
          </table:table-cell>
          <table:table-cell table:formula="of:=[.L15]+[.J16]" office:value-type="float" office:value="420000000" calcext:value-type="float">
            <text:p>420 000 000</text:p>
          </table:table-cell>
        </table:table-row>
        <table:table-row table:style-name="ro3">
          <table:table-cell office:value-type="float" office:value="12" calcext:value-type="float">
            <text:p>12</text:p>
          </table:table-cell>
          <table:table-cell office:value-type="string" calcext:value-type="string">
            <text:p>Production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0" calcext:value-type="float">
            <text:p>0</text:p>
          </table:table-cell>
          <table:table-cell table:formula="of:=[.E17]+[.F17]+[.G17]+[.H17]+[.I17]" office:value-type="float" office:value="72000000" calcext:value-type="float">
            <text:p>72 000 000</text:p>
          </table:table-cell>
          <table:table-cell table:formula="of:=[.J17]/(1+8%)^[.A17]" office:value-type="float" office:value="28592190.6225114" calcext:value-type="float">
            <text:p>28 592 191</text:p>
          </table:table-cell>
          <table:table-cell table:formula="of:=[.L16]+[.J17]" office:value-type="float" office:value="492000000" calcext:value-type="float">
            <text:p>492 000 000</text:p>
          </table:table-cell>
        </table:table-row>
        <table:table-row table:style-name="ro3">
          <table:table-cell office:value-type="float" office:value="13" calcext:value-type="float">
            <text:p>13</text:p>
          </table:table-cell>
          <table:table-cell office:value-type="string" calcext:value-type="string">
            <text:p>Production + fermeture </text:p>
          </table:table-cell>
          <table:table-cell office:value-type="float" office:value="100000" calcext:value-type="float">
            <text:p>100 000</text:p>
          </table:table-cell>
          <table:table-cell office:value-type="float" office:value="1500" calcext:value-type="float">
            <text:p>1 500</text:p>
          </table:table-cell>
          <table:table-cell office:value-type="float" office:value="150000000" calcext:value-type="float">
            <text:p>150 000 000</text:p>
          </table:table-cell>
          <table:table-cell office:value-type="float" office:value="-70000000" calcext:value-type="float">
            <text:p>-70 000 000</text:p>
          </table:table-cell>
          <table:table-cell office:value-type="float" office:value="0" calcext:value-type="float">
            <text:p>0</text:p>
          </table:table-cell>
          <table:table-cell office:value-type="float" office:value="-8000000" calcext:value-type="float">
            <text:p>-8 000 000</text:p>
          </table:table-cell>
          <table:table-cell office:value-type="float" office:value="-30000000" calcext:value-type="float">
            <text:p>-30 000 000</text:p>
          </table:table-cell>
          <table:table-cell table:formula="of:=[.E18]+[.F18]+[.G18]+[.H18]+[.I18]" office:value-type="float" office:value="42000000" calcext:value-type="float">
            <text:p>42 000 000</text:p>
          </table:table-cell>
          <table:table-cell table:formula="of:=[.J18]/(1+8%)^[.A18]" office:value-type="float" office:value="15443312.836233" calcext:value-type="float">
            <text:p>15 443 313</text:p>
          </table:table-cell>
          <table:table-cell table:formula="of:=[.L17]+[.J18]" office:value-type="float" office:value="534000000" calcext:value-type="float">
            <text:p>534 000 000</text:p>
          </table:table-cell>
        </table:table-row>
      </table:table>
      <table:table table:name="03_CF_Pessimiste" table:style-name="ta1">
        <table:table-column table:style-name="co3" table:default-cell-style-name="ce9"/>
        <table:table-column table:style-name="co3" table:default-cell-style-name="ce6"/>
        <table:table-column table:style-name="co3" table:number-columns-repeated="10" table:default-cell-style-name="ce10"/>
        <table:table-row table:style-name="ro1">
          <table:table-cell table:style-name="ce12" office:value-type="string" calcext:value-type="string">
            <text:p>Cash-flows du scénario pessimiste</text:p>
          </table:table-cell>
          <table:table-cell table:style-name="Default" table:number-columns-repeated="11"/>
        </table:table-row>
        <table:table-row table:style-name="ro2">
          <table:table-cell table:style-name="ce2" office:value-type="string" calcext:value-type="string">
            <text:p>Calcul annuel des flux de trésorerie du scénario pessimiste</text:p>
          </table:table-cell>
          <table:table-cell table:style-name="Default" table:number-columns-repeated="11"/>
        </table:table-row>
        <table:table-row table:style-name="ro3">
          <table:table-cell table:style-name="Default" table:number-columns-repeated="12"/>
        </table:table-row>
        <table:table-row table:style-name="ro4">
          <table:table-cell table:style-name="ce8" office:value-type="string" calcext:value-type="string">
            <text:p>Année </text:p>
          </table:table-cell>
          <table:table-cell table:style-name="ce8" office:value-type="string" calcext:value-type="string">
            <text:p>Phase </text:p>
          </table:table-cell>
          <table:table-cell table:style-name="ce8" office:value-type="string" calcext:value-type="string">
            <text:p>Production </text:p>
          </table:table-cell>
          <table:table-cell table:style-name="ce8" office:value-type="string" calcext:value-type="string">
            <text:p>Prix </text:p>
          </table:table-cell>
          <table:table-cell table:style-name="ce8" office:value-type="string" calcext:value-type="string">
            <text:p>Revenus </text:p>
          </table:table-cell>
          <table:table-cell table:style-name="ce8" office:value-type="string" calcext:value-type="string">
            <text:p>OPEX </text:p>
          </table:table-cell>
          <table:table-cell table:style-name="ce8" office:value-type="string" calcext:value-type="string">
            <text:p>CAPEX </text:p>
          </table:table-cell>
          <table:table-cell table:style-name="ce8" office:value-type="string" calcext:value-type="string">
            <text:p>Taxes/Royalties </text:p>
          </table:table-cell>
          <table:table-cell table:style-name="ce8" office:value-type="string" calcext:value-type="string">
            <text:p>Fermeture </text:p>
          </table:table-cell>
          <table:table-cell table:style-name="ce8" office:value-type="string" calcext:value-type="string">
            <text:p>Cash-flow net </text:p>
          </table:table-cell>
          <table:table-cell table:style-name="ce8" office:value-type="string" calcext:value-type="string">
            <text:p>Cash-flow actualisé </text:p>
          </table:table-cell>
          <table:table-cell table:style-name="ce8" office:value-type="string" calcext:value-type="string">
            <text:p>Cash-flow cumulé </text:p>
          </table:table-cell>
        </table:table-row>
        <table:table-row table:style-name="ro3">
          <table:table-cell office:value-type="float" office:value="0" calcext:value-type="float">
            <text:p>0</text:p>
          </table:table-cell>
          <table:table-cell office:value-type="string" calcext:value-type="string">
            <text:p>Construction </text:p>
          </table:table-cell>
          <table:table-cell table:number-columns-repeated="4" table:style-name="ce7" office:value-type="float" office:value="0" calcext:value-type="float">
            <text:p>0</text:p>
          </table:table-cell>
          <table:table-cell table:style-name="ce11" office:value-type="float" office:value="-180000000" calcext:value-type="float">
            <text:p>-180 000 000</text:p>
          </table:table-cell>
          <table:table-cell table:number-columns-repeated="2" office:value-type="float" office:value="0" calcext:value-type="float">
            <text:p>0</text:p>
          </table:table-cell>
          <table:table-cell table:formula="of:=[.E5]+[.F5]+[.G5]+[.H5]+[.I5]" office:value-type="float" office:value="-180000000" calcext:value-type="float">
            <text:p>-180 000 000</text:p>
          </table:table-cell>
          <table:table-cell table:formula="of:=[.J5]/(1+8%)^[.A5]" office:value-type="float" office:value="-180000000" calcext:value-type="float">
            <text:p>-180 000 000</text:p>
          </table:table-cell>
          <table:table-cell table:formula="of:=[.J5]" office:value-type="float" office:value="-180000000" calcext:value-type="float">
            <text:p>-180 000 000</text:p>
          </table:table-cell>
        </table:table-row>
        <table:table-row table:style-name="ro3">
          <table:table-cell office:value-type="float" office:value="1" calcext:value-type="float">
            <text:p>1</text:p>
          </table:table-cell>
          <table:table-cell office:value-type="string" calcext:value-type="string">
            <text:p>Construction </text:p>
          </table:table-cell>
          <table:table-cell table:number-columns-repeated="4" table:style-name="ce7" office:value-type="float" office:value="0" calcext:value-type="float">
            <text:p>0</text:p>
          </table:table-cell>
          <table:table-cell table:style-name="ce11" office:value-type="float" office:value="-180000000" calcext:value-type="float">
            <text:p>-180 000 000</text:p>
          </table:table-cell>
          <table:table-cell table:number-columns-repeated="2" office:value-type="float" office:value="0" calcext:value-type="float">
            <text:p>0</text:p>
          </table:table-cell>
          <table:table-cell table:formula="of:=[.E6]+[.F6]+[.G6]+[.H6]+[.I6]" office:value-type="float" office:value="-180000000" calcext:value-type="float">
            <text:p>-180 000 000</text:p>
          </table:table-cell>
          <table:table-cell table:formula="of:=[.J6]/(1+8%)^[.A6]" office:value-type="float" office:value="-166666666.666667" calcext:value-type="float">
            <text:p>-166 666 667</text:p>
          </table:table-cell>
          <table:table-cell table:formula="of:=[.L5]+[.J6]" office:value-type="float" office:value="-360000000" calcext:value-type="float">
            <text:p>-360 000 000</text:p>
          </table:table-cell>
        </table:table-row>
        <table:table-row table:style-name="ro3">
          <table:table-cell office:value-type="float" office:value="2" calcext:value-type="float">
            <text:p>2</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7]*[.D7]"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7]+[.F7]+[.G7]+[.H7]+[.I7]" office:value-type="float" office:value="28800000" calcext:value-type="float">
            <text:p>28 800 000</text:p>
          </table:table-cell>
          <table:table-cell table:formula="of:=[.J7]/(1+8%)^[.A7]" office:value-type="float" office:value="24691358.0246914" calcext:value-type="float">
            <text:p>24 691 358</text:p>
          </table:table-cell>
          <table:table-cell table:formula="of:=[.L6]+[.J7]" office:value-type="float" office:value="-331200000" calcext:value-type="float">
            <text:p>-331 200 000</text:p>
          </table:table-cell>
        </table:table-row>
        <table:table-row table:style-name="ro3">
          <table:table-cell office:value-type="float" office:value="3" calcext:value-type="float">
            <text:p>3</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8]*[.D8]"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8]+[.F8]+[.G8]+[.H8]+[.I8]" office:value-type="float" office:value="28800000" calcext:value-type="float">
            <text:p>28 800 000</text:p>
          </table:table-cell>
          <table:table-cell table:formula="of:=[.J8]/(1+8%)^[.A8]" office:value-type="float" office:value="22862368.5413809" calcext:value-type="float">
            <text:p>22 862 369</text:p>
          </table:table-cell>
          <table:table-cell table:formula="of:=[.L7]+[.J8]" office:value-type="float" office:value="-302400000" calcext:value-type="float">
            <text:p>-302 400 000</text:p>
          </table:table-cell>
        </table:table-row>
        <table:table-row table:style-name="ro3">
          <table:table-cell office:value-type="float" office:value="4" calcext:value-type="float">
            <text:p>4</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9]*[.D9]"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9]+[.F9]+[.G9]+[.H9]+[.I9]" office:value-type="float" office:value="28800000" calcext:value-type="float">
            <text:p>28 800 000</text:p>
          </table:table-cell>
          <table:table-cell table:formula="of:=[.J9]/(1+8%)^[.A9]" office:value-type="float" office:value="21168859.7605379" calcext:value-type="float">
            <text:p>21 168 860</text:p>
          </table:table-cell>
          <table:table-cell table:formula="of:=[.L8]+[.J9]" office:value-type="float" office:value="-273600000" calcext:value-type="float">
            <text:p>-273 600 000</text:p>
          </table:table-cell>
        </table:table-row>
        <table:table-row table:style-name="ro3">
          <table:table-cell office:value-type="float" office:value="5" calcext:value-type="float">
            <text:p>5</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10]*[.D10]"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10]+[.F10]+[.G10]+[.H10]+[.I10]" office:value-type="float" office:value="28800000" calcext:value-type="float">
            <text:p>28 800 000</text:p>
          </table:table-cell>
          <table:table-cell table:formula="of:=[.J10]/(1+8%)^[.A10]" office:value-type="float" office:value="19600796.0745721" calcext:value-type="float">
            <text:p>19 600 796</text:p>
          </table:table-cell>
          <table:table-cell table:formula="of:=[.L9]+[.J10]" office:value-type="float" office:value="-244800000" calcext:value-type="float">
            <text:p>-244 800 000</text:p>
          </table:table-cell>
        </table:table-row>
        <table:table-row table:style-name="ro3">
          <table:table-cell office:value-type="float" office:value="6" calcext:value-type="float">
            <text:p>6</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11]*[.D11]"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11]+[.F11]+[.G11]+[.H11]+[.I11]" office:value-type="float" office:value="28800000" calcext:value-type="float">
            <text:p>28 800 000</text:p>
          </table:table-cell>
          <table:table-cell table:formula="of:=[.J11]/(1+8%)^[.A11]" office:value-type="float" office:value="18148885.2542334" calcext:value-type="float">
            <text:p>18 148 885</text:p>
          </table:table-cell>
          <table:table-cell table:formula="of:=[.L10]+[.J11]" office:value-type="float" office:value="-216000000" calcext:value-type="float">
            <text:p>-216 000 000</text:p>
          </table:table-cell>
        </table:table-row>
        <table:table-row table:style-name="ro3">
          <table:table-cell office:value-type="float" office:value="7" calcext:value-type="float">
            <text:p>7</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12]*[.D12]"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12]+[.F12]+[.G12]+[.H12]+[.I12]" office:value-type="float" office:value="28800000" calcext:value-type="float">
            <text:p>28 800 000</text:p>
          </table:table-cell>
          <table:table-cell table:formula="of:=[.J12]/(1+8%)^[.A12]" office:value-type="float" office:value="16804523.3835495" calcext:value-type="float">
            <text:p>16 804 523</text:p>
          </table:table-cell>
          <table:table-cell table:formula="of:=[.L11]+[.J12]" office:value-type="float" office:value="-187200000" calcext:value-type="float">
            <text:p>-187 200 000</text:p>
          </table:table-cell>
        </table:table-row>
        <table:table-row table:style-name="ro3">
          <table:table-cell office:value-type="float" office:value="8" calcext:value-type="float">
            <text:p>8</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13]*[.D13]"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13]+[.F13]+[.G13]+[.H13]+[.I13]" office:value-type="float" office:value="28800000" calcext:value-type="float">
            <text:p>28 800 000</text:p>
          </table:table-cell>
          <table:table-cell table:formula="of:=[.J13]/(1+8%)^[.A13]" office:value-type="float" office:value="15559743.8736569" calcext:value-type="float">
            <text:p>15 559 744</text:p>
          </table:table-cell>
          <table:table-cell table:formula="of:=[.L12]+[.J13]" office:value-type="float" office:value="-158400000" calcext:value-type="float">
            <text:p>-158 400 000</text:p>
          </table:table-cell>
        </table:table-row>
        <table:table-row table:style-name="ro3">
          <table:table-cell office:value-type="float" office:value="9" calcext:value-type="float">
            <text:p>9</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14]*[.D14]"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14]+[.F14]+[.G14]+[.H14]+[.I14]" office:value-type="float" office:value="28800000" calcext:value-type="float">
            <text:p>28 800 000</text:p>
          </table:table-cell>
          <table:table-cell table:formula="of:=[.J14]/(1+8%)^[.A14]" office:value-type="float" office:value="14407170.253386" calcext:value-type="float">
            <text:p>14 407 170</text:p>
          </table:table-cell>
          <table:table-cell table:formula="of:=[.L13]+[.J14]" office:value-type="float" office:value="-129600000" calcext:value-type="float">
            <text:p>-129 600 000</text:p>
          </table:table-cell>
        </table:table-row>
        <table:table-row table:style-name="ro3">
          <table:table-cell office:value-type="float" office:value="10" calcext:value-type="float">
            <text:p>10</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15]*[.D15]"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15]+[.F15]+[.G15]+[.H15]+[.I15]" office:value-type="float" office:value="28800000" calcext:value-type="float">
            <text:p>28 800 000</text:p>
          </table:table-cell>
          <table:table-cell table:formula="of:=[.J15]/(1+8%)^[.A15]" office:value-type="float" office:value="13339972.4568389" calcext:value-type="float">
            <text:p>13 339 972</text:p>
          </table:table-cell>
          <table:table-cell table:formula="of:=[.L14]+[.J15]" office:value-type="float" office:value="-100800000" calcext:value-type="float">
            <text:p>-100 800 000</text:p>
          </table:table-cell>
        </table:table-row>
        <table:table-row table:style-name="ro3">
          <table:table-cell office:value-type="float" office:value="11" calcext:value-type="float">
            <text:p>11</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16]*[.D16]"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16]+[.F16]+[.G16]+[.H16]+[.I16]" office:value-type="float" office:value="28800000" calcext:value-type="float">
            <text:p>28 800 000</text:p>
          </table:table-cell>
          <table:table-cell table:formula="of:=[.J16]/(1+8%)^[.A16]" office:value-type="float" office:value="12351826.3489249" calcext:value-type="float">
            <text:p>12 351 826</text:p>
          </table:table-cell>
          <table:table-cell table:formula="of:=[.L15]+[.J16]" office:value-type="float" office:value="-72000000" calcext:value-type="float">
            <text:p>-72 000 000</text:p>
          </table:table-cell>
        </table:table-row>
        <table:table-row table:style-name="ro3">
          <table:table-cell office:value-type="float" office:value="12" calcext:value-type="float">
            <text:p>12</text:p>
          </table:table-cell>
          <table:table-cell office:value-type="string" calcext:value-type="string">
            <text:p>Production </text:p>
          </table:table-cell>
          <table:table-cell office:value-type="float" office:value="100000" calcext:value-type="float">
            <text:p>100 000</text:p>
          </table:table-cell>
          <table:table-cell office:value-type="float" office:value="1125" calcext:value-type="float">
            <text:p>1 125</text:p>
          </table:table-cell>
          <table:table-cell table:formula="of:=[.C17]*[.D17]"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0" calcext:value-type="float">
            <text:p>0</text:p>
          </table:table-cell>
          <table:table-cell table:formula="of:=[.E17]+[.F17]+[.G17]+[.H17]+[.I17]" office:value-type="float" office:value="28800000" calcext:value-type="float">
            <text:p>28 800 000</text:p>
          </table:table-cell>
          <table:table-cell table:formula="of:=[.J17]/(1+8%)^[.A17]" office:value-type="float" office:value="11436876.2490045" calcext:value-type="float">
            <text:p>11 436 876</text:p>
          </table:table-cell>
          <table:table-cell table:formula="of:=[.L16]+[.J17]" office:value-type="float" office:value="-43200000" calcext:value-type="float">
            <text:p>-43 200 000</text:p>
          </table:table-cell>
        </table:table-row>
        <table:table-row table:style-name="ro4">
          <table:table-cell office:value-type="float" office:value="13" calcext:value-type="float">
            <text:p>13</text:p>
          </table:table-cell>
          <table:table-cell office:value-type="string" calcext:value-type="string">
            <text:p>Production + fermeture </text:p>
          </table:table-cell>
          <table:table-cell office:value-type="float" office:value="100000" calcext:value-type="float">
            <text:p>100 000</text:p>
          </table:table-cell>
          <table:table-cell office:value-type="float" office:value="1125" calcext:value-type="float">
            <text:p>1 125</text:p>
          </table:table-cell>
          <table:table-cell table:formula="of:=[.C18]*[.D18]" office:value-type="float" office:value="112500000" calcext:value-type="float">
            <text:p>112 500 000</text:p>
          </table:table-cell>
          <table:table-cell office:value-type="float" office:value="-80500000" calcext:value-type="float">
            <text:p>-80 500 000</text:p>
          </table:table-cell>
          <table:table-cell office:value-type="float" office:value="0" calcext:value-type="float">
            <text:p>0</text:p>
          </table:table-cell>
          <table:table-cell office:value-type="float" office:value="-3200000" calcext:value-type="float">
            <text:p>-3 200 000</text:p>
          </table:table-cell>
          <table:table-cell office:value-type="float" office:value="-30000000" calcext:value-type="float">
            <text:p>-30 000 000</text:p>
          </table:table-cell>
          <table:table-cell table:formula="of:=[.E18]+[.F18]+[.G18]+[.H18]+[.I18]" office:value-type="float" office:value="-1200000" calcext:value-type="float">
            <text:p>-1 200 000</text:p>
          </table:table-cell>
          <table:table-cell table:formula="of:=[.J18]/(1+8%)^[.A18]" office:value-type="float" office:value="-441237.509606657" calcext:value-type="float">
            <text:p>-441 238</text:p>
          </table:table-cell>
          <table:table-cell table:formula="of:=[.L17]+[.J18]" office:value-type="float" office:value="-44400000" calcext:value-type="float">
            <text:p>-44 400 000</text:p>
          </table:table-cell>
        </table:table-row>
      </table:table>
      <table:table table:name="04_CF_Optimiste" table:style-name="ta1">
        <table:table-column table:style-name="co3" table:default-cell-style-name="ce9"/>
        <table:table-column table:style-name="co3" table:default-cell-style-name="ce6"/>
        <table:table-column table:style-name="co3" table:default-cell-style-name="ce10"/>
        <table:table-column table:style-name="co3" table:default-cell-style-name="ce6"/>
        <table:table-column table:style-name="co3" table:default-cell-style-name="ce10"/>
        <table:table-column table:style-name="co3" table:default-cell-style-name="ce6"/>
        <table:table-column table:style-name="co3" table:default-cell-style-name="ce10"/>
        <table:table-column table:style-name="co3" table:default-cell-style-name="ce6"/>
        <table:table-column table:style-name="co3" table:number-columns-repeated="3" table:default-cell-style-name="ce10"/>
        <table:table-column table:style-name="co17" table:default-cell-style-name="ce10"/>
        <table:table-row table:style-name="ro1">
          <table:table-cell table:style-name="ce12" office:value-type="string" calcext:value-type="string">
            <text:p>Cash-flows du scénario optimiste</text:p>
          </table:table-cell>
          <table:table-cell table:style-name="Default" table:number-columns-repeated="11"/>
        </table:table-row>
        <table:table-row table:style-name="ro2">
          <table:table-cell table:style-name="ce2" office:value-type="string" calcext:value-type="string">
            <text:p>Calcul annuel des flux de trésorerie du scénario optimiste</text:p>
          </table:table-cell>
          <table:table-cell table:style-name="Default" table:number-columns-repeated="11"/>
        </table:table-row>
        <table:table-row table:style-name="ro3">
          <table:table-cell table:style-name="Default" table:number-columns-repeated="12"/>
        </table:table-row>
        <table:table-row table:style-name="ro4">
          <table:table-cell table:style-name="ce8" office:value-type="string" calcext:value-type="string">
            <text:p>Année </text:p>
          </table:table-cell>
          <table:table-cell table:style-name="ce8" office:value-type="string" calcext:value-type="string">
            <text:p>Phase </text:p>
          </table:table-cell>
          <table:table-cell table:style-name="ce8" office:value-type="string" calcext:value-type="string">
            <text:p>Production </text:p>
          </table:table-cell>
          <table:table-cell table:style-name="ce8" office:value-type="string" calcext:value-type="string">
            <text:p>Prix </text:p>
          </table:table-cell>
          <table:table-cell table:style-name="ce8" office:value-type="string" calcext:value-type="string">
            <text:p>Revenus </text:p>
          </table:table-cell>
          <table:table-cell table:style-name="ce8" office:value-type="string" calcext:value-type="string">
            <text:p>OPEX </text:p>
          </table:table-cell>
          <table:table-cell table:style-name="ce8" office:value-type="string" calcext:value-type="string">
            <text:p>CAPEX </text:p>
          </table:table-cell>
          <table:table-cell table:style-name="ce8" office:value-type="string" calcext:value-type="string">
            <text:p>Taxes/Royalties </text:p>
          </table:table-cell>
          <table:table-cell table:style-name="ce8" office:value-type="string" calcext:value-type="string">
            <text:p>Fermeture </text:p>
          </table:table-cell>
          <table:table-cell table:style-name="ce8" office:value-type="string" calcext:value-type="string">
            <text:p>Cash-flow net </text:p>
          </table:table-cell>
          <table:table-cell table:style-name="ce8" office:value-type="string" calcext:value-type="string">
            <text:p>Cash-flow actualisé </text:p>
          </table:table-cell>
          <table:table-cell table:style-name="ce8" office:value-type="string" calcext:value-type="string">
            <text:p>Cash-flow cumulé </text:p>
          </table:table-cell>
        </table:table-row>
        <table:table-row table:style-name="ro3">
          <table:table-cell office:value-type="float" office:value="0" calcext:value-type="float">
            <text:p>0</text:p>
          </table:table-cell>
          <table:table-cell office:value-type="string" calcext:value-type="string">
            <text:p>Construction </text:p>
          </table:table-cell>
          <table:table-cell table:number-columns-repeated="4" table:style-name="ce7" office:value-type="float" office:value="0" calcext:value-type="float">
            <text:p>0</text:p>
          </table:table-cell>
          <table:table-cell table:style-name="ce6" office:value-type="float" office:value="-135000000" calcext:value-type="float">
            <text:p>-135000000</text:p>
          </table:table-cell>
          <table:table-cell table:style-name="ce10" office:value-type="float" office:value="0" calcext:value-type="float">
            <text:p>0</text:p>
          </table:table-cell>
          <table:table-cell office:value-type="float" office:value="0" calcext:value-type="float">
            <text:p>0</text:p>
          </table:table-cell>
          <table:table-cell table:formula="of:=[.E5]+[.F5]+[.G5]+[.H5]+[.I5]" office:value-type="float" office:value="-135000000" calcext:value-type="float">
            <text:p>-135 000 000</text:p>
          </table:table-cell>
          <table:table-cell table:formula="of:=[.J5]/(1+8%)^[.A5]" office:value-type="float" office:value="-135000000" calcext:value-type="float">
            <text:p>-135 000 000</text:p>
          </table:table-cell>
          <table:table-cell table:formula="of:=[.J5]" office:value-type="float" office:value="-135000000" calcext:value-type="float">
            <text:p>-135 000 000</text:p>
          </table:table-cell>
        </table:table-row>
        <table:table-row table:style-name="ro3">
          <table:table-cell office:value-type="float" office:value="1" calcext:value-type="float">
            <text:p>1</text:p>
          </table:table-cell>
          <table:table-cell office:value-type="string" calcext:value-type="string">
            <text:p>Construction </text:p>
          </table:table-cell>
          <table:table-cell table:number-columns-repeated="4" table:style-name="ce7" office:value-type="float" office:value="0" calcext:value-type="float">
            <text:p>0</text:p>
          </table:table-cell>
          <table:table-cell table:style-name="ce6" office:value-type="float" office:value="-135000000" calcext:value-type="float">
            <text:p>-135000000</text:p>
          </table:table-cell>
          <table:table-cell table:style-name="ce10" office:value-type="float" office:value="0" calcext:value-type="float">
            <text:p>0</text:p>
          </table:table-cell>
          <table:table-cell office:value-type="float" office:value="0" calcext:value-type="float">
            <text:p>0</text:p>
          </table:table-cell>
          <table:table-cell table:formula="of:=[.E6]+[.F6]+[.G6]+[.H6]+[.I6]" office:value-type="float" office:value="-135000000" calcext:value-type="float">
            <text:p>-135 000 000</text:p>
          </table:table-cell>
          <table:table-cell table:formula="of:=[.J6]/(1+8%)^[.A6]" office:value-type="float" office:value="-125000000" calcext:value-type="float">
            <text:p>-125 000 000</text:p>
          </table:table-cell>
          <table:table-cell table:formula="of:=[.L5]+[.J6]" office:value-type="float" office:value="-270000000" calcext:value-type="float">
            <text:p>-270 000 000</text:p>
          </table:table-cell>
        </table:table-row>
        <table:table-row table:style-name="ro3">
          <table:table-cell office:value-type="float" office:value="2" calcext:value-type="float">
            <text:p>2</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7]*[.D7]"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7]+[.F7]+[.G7]+[.H7]+[.I7]" office:value-type="float" office:value="108900000" calcext:value-type="float">
            <text:p>108 900 000</text:p>
          </table:table-cell>
          <table:table-cell table:formula="of:=[.J7]/(1+8%)^[.A7]" office:value-type="float" office:value="93364197.5308642" calcext:value-type="float">
            <text:p>93 364 198</text:p>
          </table:table-cell>
          <table:table-cell table:formula="of:=[.L6]+[.J7]" office:value-type="float" office:value="-161100000" calcext:value-type="float">
            <text:p>-161 100 000</text:p>
          </table:table-cell>
        </table:table-row>
        <table:table-row table:style-name="ro3">
          <table:table-cell office:value-type="float" office:value="3" calcext:value-type="float">
            <text:p>3</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8]*[.D8]"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8]+[.F8]+[.G8]+[.H8]+[.I8]" office:value-type="float" office:value="108900000" calcext:value-type="float">
            <text:p>108 900 000</text:p>
          </table:table-cell>
          <table:table-cell table:formula="of:=[.J8]/(1+8%)^[.A8]" office:value-type="float" office:value="86448331.0470965" calcext:value-type="float">
            <text:p>86 448 331</text:p>
          </table:table-cell>
          <table:table-cell table:formula="of:=[.L7]+[.J8]" office:value-type="float" office:value="-52200000" calcext:value-type="float">
            <text:p>-52 200 000</text:p>
          </table:table-cell>
        </table:table-row>
        <table:table-row table:style-name="ro3">
          <table:table-cell office:value-type="float" office:value="4" calcext:value-type="float">
            <text:p>4</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9]*[.D9]"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9]+[.F9]+[.G9]+[.H9]+[.I9]" office:value-type="float" office:value="108900000" calcext:value-type="float">
            <text:p>108 900 000</text:p>
          </table:table-cell>
          <table:table-cell table:formula="of:=[.J9]/(1+8%)^[.A9]" office:value-type="float" office:value="80044750.9695338" calcext:value-type="float">
            <text:p>80 044 751</text:p>
          </table:table-cell>
          <table:table-cell table:formula="of:=[.L8]+[.J9]" office:value-type="float" office:value="56700000" calcext:value-type="float">
            <text:p>56 700 000</text:p>
          </table:table-cell>
        </table:table-row>
        <table:table-row table:style-name="ro3">
          <table:table-cell office:value-type="float" office:value="5" calcext:value-type="float">
            <text:p>5</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10]*[.D10]"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10]+[.F10]+[.G10]+[.H10]+[.I10]" office:value-type="float" office:value="108900000" calcext:value-type="float">
            <text:p>108 900 000</text:p>
          </table:table-cell>
          <table:table-cell table:formula="of:=[.J10]/(1+8%)^[.A10]" office:value-type="float" office:value="74115510.1569757" calcext:value-type="float">
            <text:p>74 115 510</text:p>
          </table:table-cell>
          <table:table-cell table:formula="of:=[.L9]+[.J10]" office:value-type="float" office:value="165600000" calcext:value-type="float">
            <text:p>165 600 000</text:p>
          </table:table-cell>
        </table:table-row>
        <table:table-row table:style-name="ro3">
          <table:table-cell office:value-type="float" office:value="6" calcext:value-type="float">
            <text:p>6</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11]*[.D11]"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11]+[.F11]+[.G11]+[.H11]+[.I11]" office:value-type="float" office:value="108900000" calcext:value-type="float">
            <text:p>108 900 000</text:p>
          </table:table-cell>
          <table:table-cell table:formula="of:=[.J11]/(1+8%)^[.A11]" office:value-type="float" office:value="68625472.3675701" calcext:value-type="float">
            <text:p>68 625 472</text:p>
          </table:table-cell>
          <table:table-cell table:formula="of:=[.L10]+[.J11]" office:value-type="float" office:value="274500000" calcext:value-type="float">
            <text:p>274 500 000</text:p>
          </table:table-cell>
        </table:table-row>
        <table:table-row table:style-name="ro3">
          <table:table-cell office:value-type="float" office:value="7" calcext:value-type="float">
            <text:p>7</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12]*[.D12]"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12]+[.F12]+[.G12]+[.H12]+[.I12]" office:value-type="float" office:value="108900000" calcext:value-type="float">
            <text:p>108 900 000</text:p>
          </table:table-cell>
          <table:table-cell table:formula="of:=[.J12]/(1+8%)^[.A12]" office:value-type="float" office:value="63542104.0440464" calcext:value-type="float">
            <text:p>63 542 104</text:p>
          </table:table-cell>
          <table:table-cell table:formula="of:=[.L11]+[.J12]" office:value-type="float" office:value="383400000" calcext:value-type="float">
            <text:p>383 400 000</text:p>
          </table:table-cell>
        </table:table-row>
        <table:table-row table:style-name="ro3">
          <table:table-cell office:value-type="float" office:value="8" calcext:value-type="float">
            <text:p>8</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13]*[.D13]"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13]+[.F13]+[.G13]+[.H13]+[.I13]" office:value-type="float" office:value="108900000" calcext:value-type="float">
            <text:p>108 900 000</text:p>
          </table:table-cell>
          <table:table-cell table:formula="of:=[.J13]/(1+8%)^[.A13]" office:value-type="float" office:value="58835281.5222652" calcext:value-type="float">
            <text:p>58 835 282</text:p>
          </table:table-cell>
          <table:table-cell table:formula="of:=[.L12]+[.J13]" office:value-type="float" office:value="492300000" calcext:value-type="float">
            <text:p>492 300 000</text:p>
          </table:table-cell>
        </table:table-row>
        <table:table-row table:style-name="ro3">
          <table:table-cell office:value-type="float" office:value="9" calcext:value-type="float">
            <text:p>9</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14]*[.D14]"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14]+[.F14]+[.G14]+[.H14]+[.I14]" office:value-type="float" office:value="108900000" calcext:value-type="float">
            <text:p>108 900 000</text:p>
          </table:table-cell>
          <table:table-cell table:formula="of:=[.J14]/(1+8%)^[.A14]" office:value-type="float" office:value="54477112.5206159" calcext:value-type="float">
            <text:p>54 477 113</text:p>
          </table:table-cell>
          <table:table-cell table:formula="of:=[.L13]+[.J14]" office:value-type="float" office:value="601200000" calcext:value-type="float">
            <text:p>601 200 000</text:p>
          </table:table-cell>
        </table:table-row>
        <table:table-row table:style-name="ro3">
          <table:table-cell office:value-type="float" office:value="10" calcext:value-type="float">
            <text:p>10</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15]*[.D15]"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15]+[.F15]+[.G15]+[.H15]+[.I15]" office:value-type="float" office:value="108900000" calcext:value-type="float">
            <text:p>108 900 000</text:p>
          </table:table-cell>
          <table:table-cell table:formula="of:=[.J15]/(1+8%)^[.A15]" office:value-type="float" office:value="50441770.8524221" calcext:value-type="float">
            <text:p>50 441 771</text:p>
          </table:table-cell>
          <table:table-cell table:formula="of:=[.L14]+[.J15]" office:value-type="float" office:value="710100000" calcext:value-type="float">
            <text:p>710 100 000</text:p>
          </table:table-cell>
        </table:table-row>
        <table:table-row table:style-name="ro3">
          <table:table-cell office:value-type="float" office:value="11" calcext:value-type="float">
            <text:p>11</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16]*[.D16]"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16]+[.F16]+[.G16]+[.H16]+[.I16]" office:value-type="float" office:value="108900000" calcext:value-type="float">
            <text:p>108 900 000</text:p>
          </table:table-cell>
          <table:table-cell table:formula="of:=[.J16]/(1+8%)^[.A16]" office:value-type="float" office:value="46705343.3818723" calcext:value-type="float">
            <text:p>46 705 343</text:p>
          </table:table-cell>
          <table:table-cell table:formula="of:=[.L15]+[.J16]" office:value-type="float" office:value="819000000" calcext:value-type="float">
            <text:p>819 000 000</text:p>
          </table:table-cell>
        </table:table-row>
        <table:table-row table:style-name="ro3">
          <table:table-cell office:value-type="float" office:value="12" calcext:value-type="float">
            <text:p>12</text:p>
          </table:table-cell>
          <table:table-cell office:value-type="string" calcext:value-type="string">
            <text:p>Production </text:p>
          </table:table-cell>
          <table:table-cell office:value-type="float" office:value="100000" calcext:value-type="float">
            <text:p>100 000</text:p>
          </table:table-cell>
          <table:table-cell office:value-type="float" office:value="1875" calcext:value-type="float">
            <text:p>1875</text:p>
          </table:table-cell>
          <table:table-cell table:formula="of:=[.C17]*[.D17]"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0" calcext:value-type="float">
            <text:p>0</text:p>
          </table:table-cell>
          <table:table-cell table:formula="of:=[.E17]+[.F17]+[.G17]+[.H17]+[.I17]" office:value-type="float" office:value="108900000" calcext:value-type="float">
            <text:p>108 900 000</text:p>
          </table:table-cell>
          <table:table-cell table:formula="of:=[.J17]/(1+8%)^[.A17]" office:value-type="float" office:value="43245688.3165484" calcext:value-type="float">
            <text:p>43 245 688</text:p>
          </table:table-cell>
          <table:table-cell table:formula="of:=[.L16]+[.J17]" office:value-type="float" office:value="927900000" calcext:value-type="float">
            <text:p>927 900 000</text:p>
          </table:table-cell>
        </table:table-row>
        <table:table-row table:style-name="ro4">
          <table:table-cell office:value-type="float" office:value="13" calcext:value-type="float">
            <text:p>13</text:p>
          </table:table-cell>
          <table:table-cell office:value-type="string" calcext:value-type="string">
            <text:p>Production + fermeture </text:p>
          </table:table-cell>
          <table:table-cell office:value-type="float" office:value="100000" calcext:value-type="float">
            <text:p>100 000</text:p>
          </table:table-cell>
          <table:table-cell office:value-type="float" office:value="1875" calcext:value-type="float">
            <text:p>1875</text:p>
          </table:table-cell>
          <table:table-cell table:formula="of:=[.C18]*[.D18]" office:value-type="float" office:value="187500000" calcext:value-type="float">
            <text:p>187 500 000</text:p>
          </table:table-cell>
          <table:table-cell office:value-type="float" office:value="-66500000" calcext:value-type="float">
            <text:p>-66500000</text:p>
          </table:table-cell>
          <table:table-cell office:value-type="float" office:value="0" calcext:value-type="float">
            <text:p>0</text:p>
          </table:table-cell>
          <table:table-cell office:value-type="float" office:value="-12100000" calcext:value-type="float">
            <text:p>-12100000</text:p>
          </table:table-cell>
          <table:table-cell office:value-type="float" office:value="-30000000" calcext:value-type="float">
            <text:p>-30 000 000</text:p>
          </table:table-cell>
          <table:table-cell table:formula="of:=[.E18]+[.F18]+[.G18]+[.H18]+[.I18]" office:value-type="float" office:value="78900000" calcext:value-type="float">
            <text:p>78 900 000</text:p>
          </table:table-cell>
          <table:table-cell table:formula="of:=[.J18]/(1+8%)^[.A18]" office:value-type="float" office:value="29011366.2566377" calcext:value-type="float">
            <text:p>29 011 366</text:p>
          </table:table-cell>
          <table:table-cell table:formula="of:=[.L17]+[.J18]" office:value-type="float" office:value="1006800000" calcext:value-type="float">
            <text:p>1 006 800 000</text:p>
          </table:table-cell>
        </table:table-row>
      </table:table>
      <table:table table:name="05_Résumé_Scénarios" table:style-name="ta1">
        <table:table-column table:style-name="co4" table:default-cell-style-name="Default"/>
        <table:table-column table:style-name="co3" table:number-columns-repeated="10" table:default-cell-style-name="Default"/>
        <table:table-row table:style-name="ro1">
          <table:table-cell table:style-name="ce1" office:value-type="string" calcext:value-type="string">
            <text:p>Résumé des scénarios</text:p>
          </table:table-cell>
          <table:table-cell table:number-columns-repeated="10"/>
        </table:table-row>
        <table:table-row table:style-name="ro5">
          <table:table-cell table:style-name="ce13" office:value-type="string" calcext:value-type="string">
            <text:p>Comparaison des principaux indicateurs économiques du projet</text:p>
          </table:table-cell>
          <table:table-cell table:number-columns-repeated="10"/>
        </table:table-row>
        <table:table-row table:style-name="ro3">
          <table:table-cell table:number-columns-repeated="11"/>
        </table:table-row>
        <table:table-row table:style-name="ro6">
          <table:table-cell table:style-name="ce3" office:value-type="string" calcext:value-type="string">
            <text:p>Scénario</text:p>
          </table:table-cell>
          <table:table-cell table:style-name="ce16" office:value-type="string" calcext:value-type="string">
            <text:p>VAN</text:p>
          </table:table-cell>
          <table:table-cell table:style-name="ce16" office:value-type="string" calcext:value-type="string">
            <text:p>TRI</text:p>
          </table:table-cell>
          <table:table-cell table:style-name="ce16" office:value-type="string" calcext:value-type="string">
            <text:p>Payback</text:p>
          </table:table-cell>
          <table:table-cell table:style-name="ce16" office:value-type="string" calcext:value-type="string">
            <text:p>Cash-flow annuel moyen</text:p>
          </table:table-cell>
          <table:table-cell table:style-name="ce3" office:value-type="string" calcext:value-type="string">
            <text:p>Lecture</text:p>
          </table:table-cell>
          <table:table-cell/>
          <table:table-cell table:style-name="ce3" office:value-type="string" calcext:value-type="string">
            <text:p>Scénario</text:p>
          </table:table-cell>
          <table:table-cell table:style-name="ce16" office:value-type="string" calcext:value-type="string">
            <text:p>VAN numérique</text:p>
          </table:table-cell>
          <table:table-cell table:style-name="ce16" office:value-type="string" calcext:value-type="string">
            <text:p>TRI numérique</text:p>
          </table:table-cell>
          <table:table-cell table:style-name="ce16" office:value-type="string" calcext:value-type="string">
            <text:p>Cash-flow moyen numérique</text:p>
          </table:table-cell>
        </table:table-row>
        <table:table-row table:style-name="ro3">
          <table:table-cell table:style-name="ce4" office:value-type="string" calcext:value-type="string">
            <text:p>Pessimiste</text:p>
          </table:table-cell>
          <table:table-cell table:style-name="ce17" office:value-type="string" calcext:value-type="string">
            <text:p>-156,7 M$</text:p>
          </table:table-cell>
          <table:table-cell table:style-name="ce18" office:value-type="percentage" office:value="-0.02" calcext:value-type="percentage">
            <text:p>-2 %</text:p>
          </table:table-cell>
          <table:table-cell table:style-name="ce17" office:value-type="string" calcext:value-type="string">
            <text:p>Non récupéré</text:p>
          </table:table-cell>
          <table:table-cell table:style-name="ce17" office:value-type="string" calcext:value-type="string">
            <text:p>28,8 M$</text:p>
          </table:table-cell>
          <table:table-cell table:style-name="ce4" office:value-type="string" calcext:value-type="string">
            <text:p>Non rentable</text:p>
          </table:table-cell>
          <table:table-cell/>
          <table:table-cell table:style-name="ce4" office:value-type="string" calcext:value-type="string">
            <text:p>Pessimiste</text:p>
          </table:table-cell>
          <table:table-cell table:style-name="ce17" office:value-type="float" office:value="-156.7" calcext:value-type="float">
            <text:p>-156,7</text:p>
          </table:table-cell>
          <table:table-cell table:style-name="ce17" office:value-type="float" office:value="-2" calcext:value-type="float">
            <text:p>-2</text:p>
          </table:table-cell>
          <table:table-cell table:style-name="ce17" office:value-type="float" office:value="28.8" calcext:value-type="float">
            <text:p>28,8</text:p>
          </table:table-cell>
        </table:table-row>
        <table:table-row table:style-name="ro3">
          <table:table-cell table:style-name="ce4" office:value-type="string" calcext:value-type="string">
            <text:p>Central</text:p>
          </table:table-cell>
          <table:table-cell table:style-name="ce17" office:value-type="string" calcext:value-type="string">
            <text:p>202,5 M$</text:p>
          </table:table-cell>
          <table:table-cell table:style-name="ce18" office:value-type="percentage" office:value="0.19" calcext:value-type="percentage">
            <text:p>19 %</text:p>
          </table:table-cell>
          <table:table-cell table:style-name="ce17" office:value-type="string" calcext:value-type="string">
            <text:p>5,17 ans</text:p>
          </table:table-cell>
          <table:table-cell table:style-name="ce17" office:value-type="string" calcext:value-type="string">
            <text:p>72,0 M$</text:p>
          </table:table-cell>
          <table:table-cell table:style-name="ce4" office:value-type="string" calcext:value-type="string">
            <text:p>Rentable</text:p>
          </table:table-cell>
          <table:table-cell/>
          <table:table-cell table:style-name="ce4" office:value-type="string" calcext:value-type="string">
            <text:p>Central</text:p>
          </table:table-cell>
          <table:table-cell table:style-name="ce17" office:value-type="float" office:value="202.5" calcext:value-type="float">
            <text:p>202,5</text:p>
          </table:table-cell>
          <table:table-cell table:style-name="ce17" office:value-type="float" office:value="19" calcext:value-type="float">
            <text:p>19</text:p>
          </table:table-cell>
          <table:table-cell table:style-name="ce17" office:value-type="float" office:value="72" calcext:value-type="float">
            <text:p>72</text:p>
          </table:table-cell>
        </table:table-row>
        <table:table-row table:style-name="ro3">
          <table:table-cell table:style-name="ce4" office:value-type="string" calcext:value-type="string">
            <text:p>Optimiste</text:p>
          </table:table-cell>
          <table:table-cell table:style-name="ce17" office:value-type="string" calcext:value-type="string">
            <text:p>488,9 M$</text:p>
          </table:table-cell>
          <table:table-cell table:style-name="ce18" office:value-type="percentage" office:value="0.33" calcext:value-type="percentage">
            <text:p>33 %</text:p>
          </table:table-cell>
          <table:table-cell table:style-name="ce17" office:value-type="string" calcext:value-type="string">
            <text:p>4,48 ans</text:p>
          </table:table-cell>
          <table:table-cell table:style-name="ce17" office:value-type="string" calcext:value-type="string">
            <text:p>108,9 M$</text:p>
          </table:table-cell>
          <table:table-cell table:style-name="ce4" office:value-type="string" calcext:value-type="string">
            <text:p>Très attractif</text:p>
          </table:table-cell>
          <table:table-cell/>
          <table:table-cell table:style-name="ce4" office:value-type="string" calcext:value-type="string">
            <text:p>Optimiste</text:p>
          </table:table-cell>
          <table:table-cell table:style-name="ce17" office:value-type="float" office:value="488.9" calcext:value-type="float">
            <text:p>488,9</text:p>
          </table:table-cell>
          <table:table-cell table:style-name="ce17" office:value-type="float" office:value="33" calcext:value-type="float">
            <text:p>33</text:p>
          </table:table-cell>
          <table:table-cell table:style-name="ce17" office:value-type="float" office:value="108.9" calcext:value-type="float">
            <text:p>108,9</text:p>
          </table:table-cell>
        </table:table-row>
        <table:table-row table:style-name="ro3" table:number-rows-repeated="2">
          <table:table-cell table:number-columns-repeated="11"/>
        </table:table-row>
        <table:table-row table:style-name="ro7">
          <table:table-cell table:style-name="ce14" office:value-type="string" calcext:value-type="string">
            <text:p>Le projet est rentable dans le scénario central et très attractif dans le scénario optimiste. En revanche, le scénario pessimiste présente une VAN négative et un TRI inférieur au taux d’actualisation, ce qui montre que le projet est sensible aux hypothèses de prix, de CAPEX et d’OPEX.</text:p>
          </table:table-cell>
          <table:table-cell table:style-name="ce15" table:number-columns-repeated="5"/>
          <table:table-cell table:number-columns-repeated="5"/>
        </table:table-row>
        <table:table-row table:style-name="ro3">
          <table:table-cell table:style-name="ce15" table:number-columns-repeated="6"/>
          <table:table-cell table:number-columns-repeated="5"/>
        </table:table-row>
        <table:table-row table:style-name="ro3">
          <table:table-cell table:number-columns-repeated="5"/>
          <table:table-cell table:style-name="ce15"/>
          <table:table-cell table:number-columns-repeated="5"/>
        </table:table-row>
      </table:table>
      <table:table table:name="06_Graphiques" table:style-name="ta1">
        <table:table-column table:style-name="co3" table:number-columns-repeated="14" table:default-cell-style-name="Default"/>
        <table:table-row table:style-name="ro3">
          <table:table-cell>
            <draw:frame draw:z-index="0" draw:style-name="gr1" draw:text-style-name="P1" svg:width="15.999cm" svg:height="8.999cm" svg:x="0.001cm" svg:y="0.001cm">
              <draw:object draw:notify-on-update-of-ranges="'06_Graphiques'.J29:'06_Graphiques'.J31 '06_Graphiques'.K28:'06_Graphiques'.K28 '06_Graphiques'.K29:'06_Graphiques'.K31" xlink:href="./Object 1" xlink:type="simple" xlink:show="embed" xlink:actuate="onLoad">
                <loext:p/>
              </draw:object>
              <draw:image xlink:href="./ObjectReplacements/Object 1" xlink:type="simple" xlink:show="embed" xlink:actuate="onLoad"/>
            </draw:frame>
          </table:table-cell>
          <table:table-cell table:number-columns-repeated="13"/>
        </table:table-row>
        <table:table-row table:style-name="ro3" table:number-rows-repeated="2">
          <table:table-cell table:number-columns-repeated="14"/>
        </table:table-row>
        <table:table-row table:style-name="ro3">
          <table:table-cell table:number-columns-repeated="8"/>
          <table:table-cell>
            <draw:frame draw:z-index="1" draw:style-name="gr1" draw:text-style-name="P1" svg:width="15.999cm" svg:height="8.999cm" svg:x="0.001cm" svg:y="0.001cm">
              <draw:object draw:notify-on-update-of-ranges="'06_Graphiques'.M29:'06_Graphiques'.M31 '06_Graphiques'.N28:'06_Graphiques'.N28 '06_Graphiques'.N29:'06_Graphiques'.N31" xlink:href="./Object 2" xlink:type="simple" xlink:show="embed" xlink:actuate="onLoad">
                <loext:p/>
              </draw:object>
              <draw:image xlink:href="./ObjectReplacements/Object 2" xlink:type="simple" xlink:show="embed" xlink:actuate="onLoad"/>
            </draw:frame>
          </table:table-cell>
          <table:table-cell table:number-columns-repeated="5"/>
        </table:table-row>
        <table:table-row table:style-name="ro3" table:number-rows-repeated="19">
          <table:table-cell table:number-columns-repeated="14"/>
        </table:table-row>
        <table:table-row table:style-name="ro3">
          <table:table-cell>
            <draw:frame draw:z-index="2" draw:style-name="gr1" draw:text-style-name="P1" svg:width="15.999cm" svg:height="8.999cm" svg:x="0.001cm" svg:y="0.001cm">
              <draw:object draw:notify-on-update-of-ranges="'06_Graphiques'.M29:'06_Graphiques'.M31 '06_Graphiques'.N28:'06_Graphiques'.N28 '06_Graphiques'.N29:'06_Graphiques'.N31" xlink:href="./Object 3" xlink:type="simple" xlink:show="embed" xlink:actuate="onLoad">
                <loext:p/>
              </draw:object>
              <draw:image xlink:href="./ObjectReplacements/Object 3" xlink:type="simple" xlink:show="embed" xlink:actuate="onLoad"/>
            </draw:frame>
          </table:table-cell>
          <table:table-cell table:number-columns-repeated="13"/>
        </table:table-row>
        <table:table-row table:style-name="ro3" table:number-rows-repeated="3">
          <table:table-cell table:number-columns-repeated="14"/>
        </table:table-row>
        <table:table-row table:style-name="ro6">
          <table:table-cell table:number-columns-repeated="9"/>
          <table:table-cell table:style-name="ce3" office:value-type="string" calcext:value-type="string">
            <text:p>Scénario</text:p>
          </table:table-cell>
          <table:table-cell table:style-name="ce16" office:value-type="string" calcext:value-type="string">
            <text:p>VAN</text:p>
          </table:table-cell>
          <table:table-cell table:style-name="ce15"/>
          <table:table-cell table:style-name="ce3" office:value-type="string" calcext:value-type="string">
            <text:p>Scénario</text:p>
          </table:table-cell>
          <table:table-cell table:style-name="ce16" office:value-type="string" calcext:value-type="string">
            <text:p>Cash-flow moyen numérique</text:p>
          </table:table-cell>
        </table:table-row>
        <table:table-row table:style-name="ro3">
          <table:table-cell table:number-columns-repeated="9"/>
          <table:table-cell table:style-name="ce4" office:value-type="string" calcext:value-type="string">
            <text:p>Pessimiste</text:p>
          </table:table-cell>
          <table:table-cell table:style-name="ce17" office:value-type="float" office:value="-156.7" calcext:value-type="float">
            <text:p>-156,7</text:p>
          </table:table-cell>
          <table:table-cell/>
          <table:table-cell table:style-name="ce4" office:value-type="string" calcext:value-type="string">
            <text:p>Pessimiste</text:p>
          </table:table-cell>
          <table:table-cell table:style-name="ce17" office:value-type="float" office:value="28.8" calcext:value-type="float">
            <text:p>28,8</text:p>
          </table:table-cell>
        </table:table-row>
        <table:table-row table:style-name="ro3">
          <table:table-cell table:number-columns-repeated="9"/>
          <table:table-cell table:style-name="ce4" office:value-type="string" calcext:value-type="string">
            <text:p>Central</text:p>
          </table:table-cell>
          <table:table-cell table:style-name="ce17" office:value-type="float" office:value="202.5" calcext:value-type="float">
            <text:p>202,5</text:p>
          </table:table-cell>
          <table:table-cell/>
          <table:table-cell table:style-name="ce4" office:value-type="string" calcext:value-type="string">
            <text:p>Central</text:p>
          </table:table-cell>
          <table:table-cell table:style-name="ce17" office:value-type="float" office:value="72" calcext:value-type="float">
            <text:p>72</text:p>
          </table:table-cell>
        </table:table-row>
        <table:table-row table:style-name="ro3">
          <table:table-cell table:number-columns-repeated="9"/>
          <table:table-cell table:style-name="ce4" office:value-type="string" calcext:value-type="string">
            <text:p>Optimiste</text:p>
          </table:table-cell>
          <table:table-cell table:style-name="ce17" office:value-type="float" office:value="488.9" calcext:value-type="float">
            <text:p>488,9</text:p>
          </table:table-cell>
          <table:table-cell/>
          <table:table-cell table:style-name="ce4" office:value-type="string" calcext:value-type="string">
            <text:p>Optimiste</text:p>
          </table:table-cell>
          <table:table-cell table:style-name="ce17" office:value-type="float" office:value="108.9" calcext:value-type="float">
            <text:p>108,9</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number-style style:name="N115">
      <number:number number:decimal-places="1" number:min-decimal-places="1" number:min-integer-digits="1"/>
    </number:number-style>
    <number:number-style style:name="N116">
      <number:number number:decimal-places="3" number:min-decimal-places="3" number:min-integer-digits="1"/>
    </number:number-style>
    <number:number-style style:name="N117">
      <number:number number:decimal-places="4" number:min-decimal-places="4" number:min-integer-digits="1"/>
    </number:number-style>
    <number:number-style style:name="N118">
      <number:number number:decimal-places="5" number:min-decimal-places="5" number:min-integer-digits="1"/>
    </number:number-style>
    <number:number-style style:name="N119">
      <number:number number:decimal-places="6" number:min-decimal-places="6"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6T17:25:39.558017200</meta:creation-date>
    <dc:date>2026-06-26T20:44:48.893557700</dc:date>
    <meta:editing-duration>PT1H13M42S</meta:editing-duration>
    <meta:editing-cycles>1</meta:editing-cycles>
    <meta:document-statistic meta:table-count="7" meta:cell-count="674" meta:object-count="3"/>
    <meta:generator>LibreOffice/26.2.4.2$Windows_X86_64 LibreOffice_project/0229ac93fcf0d7cbc6376066c6f35021cef002dc</meta:generator>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13pt" style:font-size-asian="13pt" style:font-size-complex="13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6cm" svg:height="9cm" xlink:href=".." xlink:type="simple" chart:class="chart:bar" chart:style-name="ch1">
        <chart:title svg:x="5.893cm" svg:y="0.359cm" chart:style-name="ch2">
          <text:p>VAN par scénario, en M$</text:p>
        </chart:title>
        <chart:plot-area chart:style-name="ch3" svg:x="1.321cm" svg:y="1.301cm" svg:width="14.359cm" svg:height="7.519cm">
          <chart:coordinate-region svg:x="2.292cm" svg:y="1.503cm" svg:width="13.388cm" svg:height="7.115cm"/>
          <chart:axis chart:dimension="x" chart:name="primary-x" chart:style-name="ch4" chartooo:axis-type="auto">
            <chartooo:date-scale/>
            <chart:categories table:cell-range-address="'06_Graphiques'.J29:'06_Graphiques'.J31"/>
          </chart:axis>
          <chart:axis chart:dimension="y" chart:name="primary-y" chart:style-name="ch5">
            <chart:title svg:x="0.451cm" svg:y="5.929cm" chart:style-name="ch6">
              <text:p><text:span text:style-name="T1">VAN en M$</text:span></text:p>
            </chart:title>
            <chart:grid chart:style-name="ch7" chart:class="major"/>
          </chart:axis>
          <chart:series chart:style-name="ch8" chart:values-cell-range-address="'06_Graphiques'.K29:'06_Graphiques'.K31" chart:label-cell-address="'06_Graphiques'.K28:'06_Graphiques'.K28"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N</text:p>
                <draw:g>
                  <svg:desc>'06_Graphiques'.K28:'06_Graphiques'.K28</svg:desc>
                </draw:g>
              </table:table-cell>
            </table:table-row>
          </table:table-header-rows>
          <table:table-rows>
            <table:table-row>
              <table:table-cell office:value-type="string">
                <text:p>Pessimiste</text:p>
                <draw:g>
                  <svg:desc>'06_Graphiques'.J29:'06_Graphiques'.J31</svg:desc>
                </draw:g>
              </table:table-cell>
              <table:table-cell office:value-type="float" office:value="-156.7">
                <text:p>-156.7</text:p>
                <draw:g>
                  <svg:desc>'06_Graphiques'.K29:'06_Graphiques'.K31</svg:desc>
                </draw:g>
              </table:table-cell>
            </table:table-row>
            <table:table-row>
              <table:table-cell office:value-type="string">
                <text:p>Central</text:p>
              </table:table-cell>
              <table:table-cell office:value-type="float" office:value="202.5">
                <text:p>202.5</text:p>
              </table:table-cell>
            </table:table-row>
            <table:table-row>
              <table:table-cell office:value-type="string">
                <text:p>Optimiste</text:p>
              </table:table-cell>
              <table:table-cell office:value-type="float" office:value="488.9">
                <text:p>488.9</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4.2$Windows_X86_64 LibreOffice_project/0229ac93fcf0d7cbc6376066c6f35021cef002dc</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13pt" style:font-size-asian="13pt" style:font-size-complex="13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9" style:family="chart">
      <style:chart-properties chart:solid-type="cuboid"/>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6cm" svg:height="9cm" xlink:href=".." xlink:type="simple" chart:class="chart:bar" chart:style-name="ch1">
        <chart:title svg:x="5.536cm" svg:y="0.316cm" chart:style-name="ch2">
          <text:p>TRI par scénario, en %</text:p>
        </chart:title>
        <chart:plot-area chart:style-name="ch3" svg:x="1.321cm" svg:y="1.301cm" svg:width="14.359cm" svg:height="6.548cm">
          <chart:coordinate-region svg:x="2.172cm" svg:y="1.503cm" svg:width="13.508cm" svg:height="5.693cm"/>
          <chart:axis chart:dimension="x" chart:name="primary-x" chart:style-name="ch4" chartooo:axis-type="auto">
            <chartooo:date-scale/>
            <chart:title svg:x="7.816cm" svg:y="8.029cm" chart:style-name="ch2">
              <text:p><text:span text:style-name="T1">Scénario</text:span></text:p>
            </chart:title>
            <chart:categories table:cell-range-address="'06_Graphiques'.M29:'06_Graphiques'.M31"/>
          </chart:axis>
          <chart:axis chart:dimension="y" chart:name="primary-y" chart:style-name="ch5">
            <chart:title svg:x="0.451cm" svg:y="5.294cm" chart:style-name="ch6">
              <text:p><text:span text:style-name="T1">TRI en %</text:span></text:p>
            </chart:title>
            <chart:grid chart:style-name="ch7" chart:class="major"/>
          </chart:axis>
          <chart:series chart:style-name="ch8" chart:values-cell-range-address="'06_Graphiques'.N29:'06_Graphiques'.N31" chart:label-cell-address="'06_Graphiques'.N28:'06_Graphiques'.N28" chart:class="chart:bar">
            <chart:data-point/>
            <chart:data-point chart:style-name="ch9"/>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ash-flow moyen numérique</text:p>
                <draw:g>
                  <svg:desc>'06_Graphiques'.N28:'06_Graphiques'.N28</svg:desc>
                </draw:g>
              </table:table-cell>
            </table:table-row>
          </table:table-header-rows>
          <table:table-rows>
            <table:table-row>
              <table:table-cell office:value-type="string">
                <text:p>Pessimiste</text:p>
                <draw:g>
                  <svg:desc>'06_Graphiques'.M29:'06_Graphiques'.M31</svg:desc>
                </draw:g>
              </table:table-cell>
              <table:table-cell office:value-type="float" office:value="28.8">
                <text:p>28.8</text:p>
                <draw:g>
                  <svg:desc>'06_Graphiques'.N29:'06_Graphiques'.N31</svg:desc>
                </draw:g>
              </table:table-cell>
            </table:table-row>
            <table:table-row>
              <table:table-cell office:value-type="string">
                <text:p>Central</text:p>
              </table:table-cell>
              <table:table-cell office:value-type="float" office:value="72">
                <text:p>72</text:p>
              </table:table-cell>
            </table:table-row>
            <table:table-row>
              <table:table-cell office:value-type="string">
                <text:p>Optimiste</text:p>
              </table:table-cell>
              <table:table-cell office:value-type="float" office:value="108.9">
                <text:p>108.9</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4.2$Windows_X86_64 LibreOffice_project/0229ac93fcf0d7cbc6376066c6f35021cef002dc</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13pt" style:font-size-asian="13pt" style:font-size-complex="13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6cm" svg:height="9cm" xlink:href=".." xlink:type="simple" chart:class="chart:bar" chart:style-name="ch1">
        <chart:title svg:x="3.232cm" svg:y="0.316cm" chart:style-name="ch2">
          <text:p>Cash-flow annuel moyen par scénario, en M$</text:p>
        </chart:title>
        <chart:plot-area chart:style-name="ch3" svg:x="1.321cm" svg:y="1.301cm" svg:width="14.359cm" svg:height="6.548cm">
          <chart:coordinate-region svg:x="2.172cm" svg:y="1.503cm" svg:width="13.508cm" svg:height="5.693cm"/>
          <chart:axis chart:dimension="x" chart:name="primary-x" chart:style-name="ch4" chartooo:axis-type="auto">
            <chartooo:date-scale/>
            <chart:title svg:x="7.816cm" svg:y="8.029cm" chart:style-name="ch2">
              <text:p><text:span text:style-name="T1">Scénario</text:span></text:p>
            </chart:title>
            <chart:categories table:cell-range-address="'06_Graphiques'.M29:'06_Graphiques'.M31"/>
          </chart:axis>
          <chart:axis chart:dimension="y" chart:name="primary-y" chart:style-name="ch5">
            <chart:title svg:x="0.451cm" svg:y="6.865cm" chart:style-name="ch6">
              <text:p><text:span text:style-name="T1">Cash-flow annuel moyen en M$</text:span></text:p>
            </chart:title>
            <chart:grid chart:style-name="ch7" chart:class="major"/>
          </chart:axis>
          <chart:series chart:style-name="ch8" chart:values-cell-range-address="'06_Graphiques'.N29:'06_Graphiques'.N31" chart:label-cell-address="'06_Graphiques'.N28:'06_Graphiques'.N28"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sh-flow moyen numérique</text:p>
                <draw:g>
                  <svg:desc>'06_Graphiques'.N28:'06_Graphiques'.N28</svg:desc>
                </draw:g>
              </table:table-cell>
            </table:table-row>
          </table:table-header-rows>
          <table:table-rows>
            <table:table-row>
              <table:table-cell office:value-type="string">
                <text:p>Pessimiste</text:p>
                <draw:g>
                  <svg:desc>'06_Graphiques'.M29:'06_Graphiques'.M31</svg:desc>
                </draw:g>
              </table:table-cell>
              <table:table-cell office:value-type="float" office:value="28.8">
                <text:p>28.8</text:p>
                <draw:g>
                  <svg:desc>'06_Graphiques'.N29:'06_Graphiques'.N31</svg:desc>
                </draw:g>
              </table:table-cell>
            </table:table-row>
            <table:table-row>
              <table:table-cell office:value-type="string">
                <text:p>Central</text:p>
              </table:table-cell>
              <table:table-cell office:value-type="float" office:value="72">
                <text:p>72</text:p>
              </table:table-cell>
            </table:table-row>
            <table:table-row>
              <table:table-cell office:value-type="string">
                <text:p>Optimiste</text:p>
              </table:table-cell>
              <table:table-cell office:value-type="float" office:value="108.9">
                <text:p>108.9</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4.2$Windows_X86_64 LibreOffice_project/0229ac93fcf0d7cbc6376066c6f35021cef002dc</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